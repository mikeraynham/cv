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 style:list-style-name="L1">
      <style:text-properties officeooo:paragraph-rsid="001e3d42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3cb480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40062d"/>
    </style:style>
    <style:style style:name="P4" style:family="paragraph" style:parent-style-name="Heading_20_1">
      <style:text-properties officeooo:rsid="002f4caf" officeooo:paragraph-rsid="002f4caf"/>
    </style:style>
    <style:style style:name="P5" style:family="paragraph" style:parent-style-name="Heading_20_3">
      <style:text-properties officeooo:paragraph-rsid="0040062d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>
      <style:text-properties officeooo:rsid="0025642b" officeooo:paragraph-rsid="0037c8e3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officeooo:rsid="0025642b" officeooo:paragraph-rsid="0037c8e3"/>
    </style:style>
    <style:style style:name="P9" style:family="paragraph" style:parent-style-name="Heading_20_3">
      <style:text-properties officeooo:paragraph-rsid="0040110b"/>
    </style:style>
    <style:style style:name="P10" style:family="paragraph" style:parent-style-name="Heading_20_3">
      <style:text-properties officeooo:paragraph-rsid="003f1d1a"/>
    </style:style>
    <style:style style:name="P11" style:family="paragraph" style:parent-style-name="Heading_20_3">
      <style:text-properties officeooo:rsid="0023e27b" officeooo:paragraph-rsid="0037c8e3"/>
    </style:style>
    <style:style style:name="P12" style:family="paragraph" style:parent-style-name="Heading_20_2">
      <style:text-properties officeooo:rsid="0030b465" officeooo:paragraph-rsid="0030b465"/>
    </style:style>
    <style:style style:name="P13" style:family="paragraph" style:parent-style-name="Heading_20_3">
      <style:text-properties officeooo:rsid="0023e27b" officeooo:paragraph-rsid="0023e27b"/>
    </style:style>
    <style:style style:name="P14" style:family="paragraph" style:parent-style-name="Heading_20_1">
      <style:text-properties officeooo:rsid="0040110b" officeooo:paragraph-rsid="0040110b"/>
    </style:style>
    <style:style style:name="P15" style:family="paragraph" style:parent-style-name="First_20_paragraph" style:list-style-name="L5">
      <style:paragraph-properties fo:margin-top="0cm" fo:margin-bottom="0cm" style:contextual-spacing="false"/>
      <style:text-properties officeooo:rsid="003ccc5c" officeooo:paragraph-rsid="0040110b"/>
    </style:style>
    <style:style style:name="T1" style:family="text">
      <style:text-properties officeooo:rsid="002f4caf"/>
    </style:style>
    <style:style style:name="T2" style:family="text">
      <style:text-properties officeooo:rsid="0040062d"/>
    </style:style>
    <style:style style:name="T3" style:family="text">
      <style:text-properties officeooo:rsid="0040110b"/>
    </style:style>
    <style:style style:name="T4" style:family="text">
      <style:text-properties officeooo:rsid="003cb480"/>
    </style:style>
    <style:style style:name="T5" style:family="text">
      <style:text-properties officeooo:rsid="001bc3b4"/>
    </style:style>
    <style:style style:name="T6" style:family="text">
      <style:text-properties officeooo:rsid="0039747c"/>
    </style:style>
    <style:style style:name="T7" style:family="text">
      <style:text-properties officeooo:rsid="0037c8e3"/>
    </style:style>
    <style:style style:name="T8" style:family="text">
      <style:text-properties officeooo:rsid="00315c91"/>
    </style:style>
    <style:style style:name="T9" style:family="text">
      <style:text-properties officeooo:rsid="0030b4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text:style-name="L1">
        <text:list-item>
          <text:p text:style-name="P1"><text:a xlink:type="simple" xlink:href="mailto:mikeraynham@gmail.com" text:style-name="Internet_20_link" text:visited-style-name="Visited_20_Internet_20_Link"><text:span text:style-name="T1">mikeraynham@gmail.com</text:span></text:a><text:span text:style-name="T1"> | </text:span>+44 7813 307561</text:p>
        </text:list-item>
      </text:list>
      <text:h text:style-name="Heading_20_1" text:outline-level="1">Summary</text:h>
      <text:list text:style-name="L2">
        <text:list-item>
          <text:p text:style-name="P2">Hands-on Tech Lead and senior software engineer with over 30 years of <text:span text:style-name="T2">e</text:span>xperience across backend development, operations, cloud platforms, and large-scale legacy systems. My strongest background is in Perl, which I have used extensively for high-capacity web systems, daemons, internal tooling, API endpoints, and data-heavy workflows. I also work with SQL, Cloudflare, GCP, and Terraform. <text:s/>I am steadily building experience with Rust for new services.</text:p>
        </text:list-item>
        <text:list-item>
          <text:p text:style-name="P3">I specialise in modernising long-lived systems, improving performance, diagnosing complex issues, and delivering pragmatic, maintainable solutions.</text:p>
        </text:list-item>
        <text:list-item>
          <text:p text:style-name="P3">Remote, UK. <text:s/>Open to fully remote roles with flexible working hours, <text:span text:style-name="T2">where versatility is valued.</text:span></text:p>
        </text:list-item>
      </text:list>
      <text:h text:style-name="P4" text:outline-level="1">Employment</text:h>
      <text:h text:style-name="Heading_20_2" text:outline-level="2">Situation Publishing</text:h>
      <text:h text:style-name="Heading_20_3" text:outline-level="3">December 2022 to present (Tech Lead)</text:h>
      <text:h text:style-name="P5" text:outline-level="3">May 2017 to present (Senior Developer)</text:h>
      <text:p text:style-name="Text_20_body">Lead engineer for the backend systems that power The Register, a leading global online tech publication, along with internal applications and the company's CRM and lead-generation platform. <text:s/>The role spans backend engineering, cloud architecture, database design, and modernising deeply embedded legacy systems.</text:p>
      <text:list text:style-name="L3">
        <text:list-item>
          <text:p text:style-name="P6">Maintaining and extending <text:span text:style-name="T3">large-scale</text:span> Perl systems across publishing infrastructure, internal tools, and daemonised services.</text:p>
        </text:list-item>
        <text:list-item>
          <text:p text:style-name="P6">Supporting a PostgreSQL-backed CRM with Kafka logs and downstream data pipelines. <text:s/>Rewrote the core contact-matching logic to provide near-instant results, dramatically improving campaign workflows.</text:p>
        </text:list-item>
        <text:list-item>
          <text:p text:style-name="P6">Designing and deploying Google Cloud Platform (GCP) services on Cloud Run, Cloud Build, IAM, VPC access, IAP, HTTPS load balancers, and Private Service Connect.</text:p>
        </text:list-item>
        <text:list-item>
          <text:p text:style-name="P6">Building modular Terraform infrastructure with secure defaults and automated deployments.</text:p>
        </text:list-item>
        <text:list-item>
          <text:p text:style-name="P6">Creating internal APIs and automation utilities, including building new components in Rust as part of incremental modernisation.</text:p>
        </text:list-item>
        <text:list-item>
          <text:p text:style-name="P6">Designing and optimising PostgreSQL and MySQL schemas and queries.</text:p>
        </text:list-item>
        <text:list-item>
          <text:p text:style-name="P6">Integrating Kafka and Debezium for replication, CDC, and event-driven pipelines.</text:p>
        </text:list-item>
        <text:list-item>
          <text:p text:style-name="P6">Diagnosing system-wide production issues, from databases to cloud services.</text:p>
        </text:list-item>
      </text:list>
      <text:h text:style-name="Heading_20_2" text:outline-level="2">SpareRoom.co.uk</text:h>
      <text:h text:style-name="Heading_20_3" text:outline-level="3">August 2011 to <text:span text:style-name="T4">May 2017</text:span> <text:span text:style-name="T5">(Technical Lead)</text:span></text:h>
      <text:p text:style-name="P7">Technical Lead for one of the UK's busiest flat-sharing websites. <text:s/>Responsible for improving code quality, performance, scalability, and development processes.</text:p>
      <text:list text:style-name="L4">
        <text:list-item>
          <text:p text:style-name="P8">Introduced Perl coding standards, code reviews, unit testing, and structured refactoring practices.</text:p>
        </text:list-item>
        <text:list-item>
          <text:p text:style-name="P8">Migrated version control from Subversion to Git.</text:p>
        </text:list-item>
        <text:list-item>
          <text:p text:style-name="P8">Improved scalability with memcached and Gearman; upgraded legacy Perl and MySQL systems.</text:p>
        </text:list-item>
        <text:list-item>
          <text:p text:style-name="P8">Built standardised development/testing environments using VirtualBox.</text:p>
        </text:list-item>
        <text:list-item>
          <text:p text:style-name="P8">Moved advert photo storage to AWS S3 behind EC2/ELB.</text:p>
        </text:list-item>
        <text:list-item>
          <text:p text:style-name="P8">Implemented HAProxy for front-end and database load balancing.</text:p>
        </text:list-item>
        <text:list-item>
          <text:p text:style-name="P8"><text:soft-page-break/>Automated deployments using Perl, Rex, and Pinto.</text:p>
        </text:list-item>
        <text:list-item>
          <text:p text:style-name="P8">Led migration of core search from MySQL to Sphinx Search for major performance gains.</text:p>
        </text:list-item>
      </text:list>
      <text:h text:style-name="Heading_20_2" text:outline-level="2">Self <text:span text:style-name="T6">E</text:span>mployment</text:h>
      <text:h text:style-name="P9" text:outline-level="3">August 2005 to August 2011</text:h>
      <text:p text:style-name="Text_20_body">Freelance web development and IT support for small businesses, including building database-driven sites (Linux, Apache/nginx, MySQL, PHP, Perl), creating custom CMS platforms, and delivering bespoke data-processing utilities.</text:p>
      <text:h text:style-name="Heading_20_2" text:outline-level="2">Cheshire Building Society</text:h>
      <text:h text:style-name="Heading_20_3" text:outline-level="3">July 2001 to April 2003 (Technical Support Programmer)</text:h>
      <text:h text:style-name="P9" text:outline-level="3">April 2003 to August 2005 (Infrastructure &amp; Security Analyst)</text:h>
      <text:p text:style-name="Text_20_body">Third-level support and later infrastructure/security work, covering critical systems support, disaster recovery testing, and maintaining security and firewall systems.</text:p>
      <text:h text:style-name="Heading_20_2" text:outline-level="2">Building Design Partnership</text:h>
      <text:h text:style-name="P10" text:outline-level="3">July 1996 to July 2001<text:span text:style-name="T7"> (Third-Level Technical Support)</text:span></text:h>
      <text:h text:style-name="Heading_20_2" text:outline-level="2">Expert Systems Design</text:h>
      <text:h text:style-name="P11" text:outline-level="3">July 1995 <text:span text:style-name="T8">to</text:span> J<text:span text:style-name="T9">uly</text:span> 1996<text:span text:style-name="T7"> (Developer &amp; On-Site Support)</text:span></text:h>
      <text:h text:style-name="P12" text:outline-level="2">Atkins Odlin &amp; Partners</text:h>
      <text:h text:style-name="P13" text:outline-level="3">April 1992 to July 1995 (Computer Administrator &amp; AutoCAD Technician)</text:h>
      <text:h text:style-name="P14" text:outline-level="1">Technical Skills</text:h>
      <text:list text:style-name="L5">
        <text:list-item>
          <text:p text:style-name="P15">Languages: Perl (primary), JavaScript, SQL (PostgreSQL &amp; MySQL), Rust (novice), Bash</text:p>
        </text:list-item>
        <text:list-item>
          <text:p text:style-name="P15">Cloud: Google Cloud Platform (Cloud Run, Cloud Build, IAM, IAP, VPC, PSC, AlloyDB)</text:p>
        </text:list-item>
        <text:list-item>
          <text:p text:style-name="P15">Infrastructure: Terraform, CI/CD pipelines, automated deployments</text:p>
        </text:list-item>
        <text:list-item>
          <text:p text:style-name="P15">Data &amp; Streaming: PostgreSQL, MySQL, Apache Kafka, Debezium</text:p>
        </text:list-item>
        <text:list-item>
          <text:p text:style-name="P15"><text:span text:style-name="T3">S</text:span>ystems &amp; Ops: Linux, Git, systemd</text:p>
        </text:list-item>
        <text:list-item>
          <text:p text:style-name="P15">Web: HTML/CSS/JavaScript, Apache HTTP Serv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 fo:line-height="120%"/>
      <style:text-properties fo:color="#4c4c4c" loext:opacity="100%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chapter" style:master-page-name="">
      <style:paragraph-properties fo:margin-top="0.199cm" fo:margin-bottom="0cm" style:contextual-spacing="false" style:page-number="auto" style:shadow="none" fo:keep-with-next="always"/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Mike Raynham</text:p>
      </style:header>
      <style:footer>
        <text:p text:style-name="MP2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ike Raynham Curriculum Vitae</dc:title>
    <dc:date>2025-12-09T13:45:15.321162000</dc:date>
    <meta:editing-duration>PT3H27M42S</meta:editing-duration>
    <meta:editing-cycles>38</meta:editing-cycles>
    <meta:generator>LibreOffice/25.8.3.2$MacOSX_AARCH64 LibreOffice_project/8ca8d55c161d602844f5428fa4b58097424e324e</meta:generator>
    <meta:document-statistic meta:table-count="0" meta:image-count="0" meta:object-count="0" meta:page-count="2" meta:paragraph-count="52" meta:word-count="570" meta:character-count="4094" meta:non-whitespace-character-count="3596"/>
  </office:meta>
</office:document-meta>
</file>