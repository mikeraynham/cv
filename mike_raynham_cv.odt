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 style:list-style-name="L1">
      <style:text-properties officeooo:paragraph-rsid="001e3d42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4fcbf5"/>
    </style:style>
    <style:style style:name="P3" style:family="paragraph" style:parent-style-name="Heading_20_1">
      <style:text-properties officeooo:rsid="0040110b" officeooo:paragraph-rsid="004b47c9"/>
    </style:style>
    <style:style style:name="P4" style:family="paragraph" style:parent-style-name="First_20_paragraph" style:list-style-name="L3">
      <style:paragraph-properties fo:margin-top="0cm" fo:margin-bottom="0cm" style:contextual-spacing="false"/>
      <style:text-properties officeooo:rsid="003ccc5c" officeooo:paragraph-rsid="004b47c9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officeooo:rsid="003ccc5c" officeooo:paragraph-rsid="004b47c9"/>
    </style:style>
    <style:style style:name="P6" style:family="paragraph" style:parent-style-name="Text_20_body" style:list-style-name="L3">
      <style:paragraph-properties fo:margin-top="0cm" fo:margin-bottom="0cm" style:contextual-spacing="false"/>
      <style:text-properties officeooo:paragraph-rsid="00506466"/>
    </style:style>
    <style:style style:name="P7" style:family="paragraph" style:parent-style-name="Heading_20_1" style:list-style-name="">
      <style:paragraph-properties fo:line-height="120%"/>
      <style:text-properties officeooo:rsid="002f4caf" officeooo:paragraph-rsid="002f4caf"/>
    </style:style>
    <style:style style:name="P8" style:family="paragraph" style:parent-style-name="Heading_20_1">
      <style:paragraph-properties fo:break-before="page"/>
      <style:text-properties officeooo:rsid="002f4caf" officeooo:paragraph-rsid="002f4caf"/>
    </style:style>
    <style:style style:name="P9" style:family="paragraph" style:parent-style-name="Heading_20_3">
      <style:text-properties officeooo:paragraph-rsid="0040062d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Heading_20_2" style:list-style-name="">
      <style:paragraph-properties fo:line-height="120%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officeooo:rsid="0025642b" officeooo:paragraph-rsid="0037c8e3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406085" officeooo:paragraph-rsid="00468447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rsid="00406085" officeooo:paragraph-rsid="0044e0b8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406085" officeooo:paragraph-rsid="00406085"/>
    </style:style>
    <style:style style:name="P17" style:family="paragraph" style:parent-style-name="Heading_20_3">
      <style:text-properties officeooo:paragraph-rsid="0040110b"/>
    </style:style>
    <style:style style:name="P18" style:family="paragraph" style:parent-style-name="Text_20_body">
      <style:text-properties officeooo:paragraph-rsid="004d6b50"/>
    </style:style>
    <style:style style:name="P19" style:family="paragraph" style:parent-style-name="Heading_20_3">
      <style:text-properties officeooo:paragraph-rsid="003f1d1a"/>
    </style:style>
    <style:style style:name="P20" style:family="paragraph" style:parent-style-name="Heading_20_3">
      <style:text-properties officeooo:rsid="0023e27b" officeooo:paragraph-rsid="0037c8e3"/>
    </style:style>
    <style:style style:name="P21" style:family="paragraph" style:parent-style-name="Heading_20_2">
      <style:text-properties officeooo:rsid="0030b465" officeooo:paragraph-rsid="0030b465"/>
    </style:style>
    <style:style style:name="P22" style:family="paragraph" style:parent-style-name="Heading_20_3">
      <style:text-properties officeooo:rsid="0023e27b" officeooo:paragraph-rsid="0023e27b"/>
    </style:style>
    <style:style style:name="T1" style:family="text">
      <style:text-properties officeooo:rsid="002f4caf"/>
    </style:style>
    <style:style style:name="T2" style:family="text">
      <style:text-properties officeooo:rsid="003ccc5c"/>
    </style:style>
    <style:style style:name="T3" style:family="text">
      <style:text-properties officeooo:rsid="0049b77c"/>
    </style:style>
    <style:style style:name="T4" style:family="text">
      <style:text-properties officeooo:rsid="004d6b50"/>
    </style:style>
    <style:style style:name="T5" style:family="text">
      <style:text-properties officeooo:rsid="003cb480"/>
    </style:style>
    <style:style style:name="T6" style:family="text">
      <style:text-properties officeooo:rsid="001bc3b4"/>
    </style:style>
    <style:style style:name="T7" style:family="text">
      <style:text-properties officeooo:rsid="0044e0b8"/>
    </style:style>
    <style:style style:name="T8" style:family="text">
      <style:text-properties officeooo:rsid="00468447"/>
    </style:style>
    <style:style style:name="T9" style:family="text">
      <style:text-properties officeooo:rsid="0048770a"/>
    </style:style>
    <style:style style:name="T10" style:family="text">
      <style:text-properties officeooo:rsid="0039747c"/>
    </style:style>
    <style:style style:name="T11" style:family="text">
      <style:text-properties officeooo:rsid="0037c8e3"/>
    </style:style>
    <style:style style:name="T12" style:family="text">
      <style:text-properties officeooo:rsid="00315c91"/>
    </style:style>
    <style:style style:name="T13" style:family="text">
      <style:text-properties officeooo:rsid="0030b4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1"><text:a xlink:type="simple" xlink:href="mailto:mikeraynham@gmail.com" text:style-name="Internet_20_link" text:visited-style-name="Visited_20_Internet_20_Link"><text:span text:style-name="T1">mikeraynham@gmail.com</text:span></text:a><text:span text:style-name="T1"> | </text:span>+44 7813 307561</text:p>
        </text:list-item>
      </text:list>
      <text:h text:style-name="Heading_20_1" text:outline-level="1">Summary</text:h>
      <text:list text:style-name="L2">
        <text:list-item>
          <text:p text:style-name="P2">Principal-level back-end and platform engineer and technical lead with deep experience building, modernising, and maintaining large, long-lived production systems.</text:p>
        </text:list-item>
        <text:list-item>
          <text:p text:style-name="P2">A disciplined advocate for comprehensive testing (including unit, integration, and characterisation suites run against real, ephemeral databases and browsers) with the full-stack depth to deliver everything from robust data structures to rich user interfaces.</text:p>
        </text:list-item>
        <text:list-item>
          <text:p text:style-name="P2">This expertise spans decoupling monolithic platforms into modern services using Rust (tokio/axum) and AI-directed Python on Google Cloud, as well as architecting complex systems like production knowledge-graph subsystems with incremental transitive-closure engines for DAGs in SQL.</text:p>
        </text:list-item>
        <text:list-item>
          <text:p text:style-name="P2">I apply this engineering judgement to scaling AI-assisted development safely, implementing rigorous guardrails like enforced fitness functions, contract testing, and strict CI gates to intercept 'plausible-but-wrong' generated code before it hits production.</text:p>
        </text:list-item>
        <text:list-item>
          <text:p text:style-name="P2">Based in the UK, looking for a fully remote, flexible role where technical leadership and a uncompromising approach to system correctness are valued.</text:p>
        </text:list-item>
      </text:list>
      <text:h text:style-name="P3" text:outline-level="1">Technical Skills</text:h>
      <text:list text:style-name="L3">
        <text:list-item>
          <text:p text:style-name="P4">Languages (fluent, hand-authored): Perl, JavaScript (ES modules, statecharts, DOM), SQL (PostgreSQL &amp; MySQL), Bash</text:p>
        </text:list-item>
        <text:list-item>
          <text:p text:style-name="P5">Languages (production): TypeScript (private-field classes, typed test suites), Rust (tokio/axum; hand-authored services)</text:p>
        </text:list-item>
        <text:list-item>
          <text:p text:style-name="P6"><text:span text:style-name="T2">AI-directed delivery: Python services via spec-driven LLM orchestration</text:span>—<text:span text:style-name="T2">architecture, specification, review, and test governance (not hand-authored)</text:span></text:p>
        </text:list-item>
        <text:list-item>
          <text:p text:style-name="P5">AI / Agentic: LLM agent orchestration (Claude Code skills, plugins, MCP, Agent Teams), spec-driven development (IEEE 830 / EARS / Gherkin)</text:p>
        </text:list-item>
        <text:list-item>
          <text:p text:style-name="P5">Cloud: Google Cloud Platform (Cloud Run, Cloud Build, IAM, IAP, VPC, PSC, AlloyDB)</text:p>
        </text:list-item>
        <text:list-item>
          <text:p text:style-name="P5">Infrastructure: Terraform, Ansible, Docker, CI/CD pipelines, automated deployments</text:p>
        </text:list-item>
        <text:list-item>
          <text:p text:style-name="P5">Data &amp; Streaming: PostgreSQL, MySQL, Apache Kafka, Debezium, Redis</text:p>
        </text:list-item>
        <text:list-item>
          <text:p text:style-name="P5">Frontend: XState statecharts (hierarchical, actor-model, history states), Svelte, graph visualisation (graphology/sigma), HTMX/server-rendered HTML, Rollup, monorepo workspaces</text:p>
        </text:list-item>
        <text:list-item>
          <text:p text:style-name="P5">Systems &amp; Ops: Linux, Git, systemd</text:p>
        </text:list-item>
        <text:list-item>
          <text:p text:style-name="P5">Web: HTML/CSS, Apache HTTP Server</text:p>
        </text:list-item>
      </text:list>
      <text:h text:style-name="P7" text:outline-level="1"/>
      <text:h text:style-name="P8" text:outline-level="1">Employment</text:h>
      <text:h text:style-name="Heading_20_2" text:outline-level="2">Situation Publishing</text:h>
      <text:h text:style-name="Heading_20_3" text:outline-level="3">December 2022 to present (Tech Lead)</text:h>
      <text:h text:style-name="P9" text:outline-level="3">May 2017 to <text:span text:style-name="T3">December 2022</text:span> (Senior Developer)</text:h>
      <text:p text:style-name="Text_20_body">Lead engineer for the back-end systems powering The Register and the company's lead-generation platform, covering cloud architecture, legacy modernisation, and infrastructure automation.</text:p>
      <text:list text:style-name="L4">
        <text:list-item>
          <text:p text:style-name="P10">Cut call centre contact searches to near-instant by rewriting the lead-generation matching logic for a PostgreSQL-backed CRM, using denormalised, heavily indexed tables (B-tree, GIN trigram, tsvector), Redis per-campaign queues, and Kafka event logs. <text:s/>All backed by a comprehensive suite of unit and integration tests executed against real, ephemeral databases.</text:p>
        </text:list-item>
        <text:list-item>
          <text:p text:style-name="P10">Designed and built a keyword knowledge-graph subsystem end to end: an incremental transitive-closure engine for directed acyclic graphs in SQL (implemented from the research literature as composable ORM components); a <text:span text:style-name="T4">WordNet-backed </text:span>search-term pipeline with a finite-state tokeniser, double-metaphone phonetic matching, word segmentation, and Unicode (NFKC) normalisation; and an XState/Svelte/sigma front-end for visual editing of the graph.</text:p>
        </text:list-item>
        <text:list-item>
          <text:p text:style-name="P10">Progressively decoupling legacy Perl logic by building modern API endpoints, automation utilities, and event-driven Kafka and Debezium pipelines. <text:s/>All with thorough, multi-layered testing strategies.</text:p>
        </text:list-item>
        <text:list-item>
          <text:p text:style-name="P10">Built production Rust services (tokio/axum) to carve functionality out of the Perl monolith: a short-URL redirector with GeoIP routing, a Kafka-to-PostgreSQL lead pipeline, a database replication monitor, and a signature-verified SendGrid webhook handler. <text:s/>Authored Infrastructure-as-Code (IaC) Terraform for reproducible deployments.</text:p>
        </text:list-item>
        <text:list-item>
          <text:p text:style-name="P10">Directed AI agents, through my spec-driven development system, to build production Python services with clean architecture and comprehensive tests: a domain-driven CRM microservice replacing the legacy platform, and a Django/Wagtail CMS on Cloud Run/AlloyDB.</text:p>
        </text:list-item>
        <text:list-item>
          <text:p text:style-name="P10">Own the GCP estate as modular Terraform: 30+ services across Cloud Run, AlloyDB, Managed Kafka, Private Service Connect, Certificate Manager, and Cloud Build, with Packer image builds, Ansible/systemd deployment, and GitHub Actions CI/CD.</text:p>
        </text:list-item>
        <text:list-item>
          <text:p text:style-name="P10">Designing and optimising PostgreSQL/MySQL schemas and queries, and diagnosing system-wide production issues from databases to cloud services.</text:p>
        </text:list-item>
        <text:list-item>
          <text:p text:style-name="P10">Instrument services with OpenTelemetry and structured logging, and test against real, ephemeral databases and browsers (testcontainers, Playwright).</text:p>
        </text:list-item>
        <text:list-item>
          <text:p text:style-name="P10">Built an agentic development workflow where specialised LLM agents produce IEEE 830 specifications, refine them into EARS syntax and Gherkin scenarios, then validate generated code against the resulting BDD/TDD suite and bespoke LLM-oriented coding standards.</text:p>
        </text:list-item>
      </text:list>
      <text:h text:style-name="P11" text:outline-level="2"/>
      <text:h text:style-name="P12" text:outline-level="2">SpareRoom.co.uk</text:h>
      <text:h text:style-name="Heading_20_3" text:outline-level="3">August 2011 to <text:span text:style-name="T5">May 2017</text:span> <text:span text:style-name="T6">(Technical Lead)</text:span></text:h>
      <text:p text:style-name="P13">Technical Lead for one of the UK's busiest flat-sharing websites, driving improvements to code quality, performance, scalability, and development processes.</text:p>
      <text:p text:style-name="P13">Key achievements:</text:p>
      <text:list text:style-name="L5">
        <text:list-item>
          <text:p text:style-name="P14">Led the <text:span text:style-name="T7">m</text:span>igration from <text:span text:style-name="T7">managed</text:span> servers to colocat<text:span text:style-name="T7">ion</text:span>, successfully switching live traffic to the new infrastructure with zero downtime and zero issues. <text:s/><text:span text:style-name="T7">R</text:span>efactored the codebase to <text:span text:style-name="T7">remove</text:span> years of hard-coded, hardware-specific configurations. <text:span text:style-name="T8">B</text:span><text:span text:style-name="T7">uil</text:span><text:span text:style-name="T8">t</text:span><text:span text:style-name="T7"> a</text:span> highly available, HAProxy-fronted MySQL read-write and read-only replica architecture to support the move. <text:s/><text:span text:style-name="T9">Used Puppet for fully reproducible server builds.</text:span></text:p>
        </text:list-item>
        <text:list-item>
          <text:p text:style-name="P15">Introduced Perl coding standards, code reviews, unit testing, and structured refactoring practices.</text:p>
        </text:list-item>
        <text:list-item>
          <text:p text:style-name="P16">Migrated version control from Subversion to Git.</text:p>
        </text:list-item>
        <text:list-item>
          <text:p text:style-name="P16">Improved scalability with memcached and Gearman; upgraded legacy Perl and MySQL systems.</text:p>
        </text:list-item>
        <text:list-item>
          <text:p text:style-name="P16">Built standardised development/testing environments using VirtualBox.</text:p>
        </text:list-item>
        <text:list-item>
          <text:p text:style-name="P16">Moved advert photo storage to AWS S3 behind EC2/ELB.</text:p>
        </text:list-item>
        <text:list-item>
          <text:p text:style-name="P16">Implemented HAProxy for front-end and database load balancing.</text:p>
        </text:list-item>
        <text:list-item>
          <text:p text:style-name="P16">Automated deployments using Perl, Rex, and Pinto.</text:p>
        </text:list-item>
        <text:list-item>
          <text:p text:style-name="P16">Led the migration of core search from MySQL to Sphinx Search, delivering major performance gains.</text:p>
        </text:list-item>
      </text:list>
      <text:h text:style-name="Heading_20_2" text:outline-level="2">Self <text:span text:style-name="T10">E</text:span>mployment</text:h>
      <text:h text:style-name="P17" text:outline-level="3">August 2005 to August 2011</text:h>
      <text:p text:style-name="P18">Freelance web development and IT support for small businesses, including building database-driven sites (Linux, Apache/nginx, MySQL, PHP, Perl), creating custom CMS platforms, and delivering bespoke data-processing utilities.</text:p>
      <text:h text:style-name="Heading_20_2" text:outline-level="2">Cheshire Building Society</text:h>
      <text:h text:style-name="Heading_20_3" text:outline-level="3">July 2001 to April 2003 (Technical Support Programmer)</text:h>
      <text:h text:style-name="P17" text:outline-level="3">April 2003 to August 2005 (Infrastructure &amp; Security Analyst)</text:h>
      <text:p text:style-name="Text_20_body">Third-level support for critical systems, followed by infrastructure and security work covering disaster recovery testing and firewall maintenance.</text:p>
      <text:h text:style-name="Heading_20_2" text:outline-level="2">Building Design Partnership</text:h>
      <text:h text:style-name="P19" text:outline-level="3">July 1996 to July 2001<text:span text:style-name="T11"> (Third-Level Technical Support)</text:span></text:h>
      <text:h text:style-name="Heading_20_2" text:outline-level="2">Expert Systems Design</text:h>
      <text:h text:style-name="P20" text:outline-level="3">July 1995 <text:span text:style-name="T12">to</text:span> J<text:span text:style-name="T13">uly</text:span> 1996<text:span text:style-name="T11"> (Developer &amp; On-Site Support)</text:span></text:h>
      <text:h text:style-name="P21" text:outline-level="2">Atkins Odlin &amp; Partners</text:h>
      <text:h text:style-name="P22" text:outline-level="3">April 1992 to July 1995 (Computer Administrator &amp; AutoCAD Technician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chapter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ike Raynham Curriculum Vitae</dc:title>
    <dc:date>2026-06-06T06:10:10.399687000</dc:date>
    <meta:editing-duration>PT16H1M30S</meta:editing-duration>
    <meta:editing-cycles>52</meta:editing-cycles>
    <meta:generator>LibreOffice/25.8.3.2$MacOSX_AARCH64 LibreOffice_project/8ca8d55c161d602844f5428fa4b58097424e324e</meta:generator>
    <meta:print-date>2026-06-06T05:48:10.443888000</meta:print-date>
    <meta:printed-by>PDF files</meta:printed-by>
    <meta:document-statistic meta:table-count="0" meta:image-count="0" meta:object-count="0" meta:page-count="3" meta:paragraph-count="61" meta:word-count="922" meta:character-count="6895" meta:non-whitespace-character-count="6063"/>
  </office:meta>
</office:document-meta>
</file>