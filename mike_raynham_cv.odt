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ourier New" svg:font-family="'Courier New'" style:font-family-generic="modern" style:font-pitch="fixed"/>
    <style:font-face style:name="Droid Sans" svg:font-family="'Droid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erriweather" svg:font-family="Merriweather" style:font-adornments="Regular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irst_20_paragraph" style:list-style-name="L1">
      <style:text-properties officeooo:paragraph-rsid="001e3d42"/>
    </style:style>
    <style:style style:name="P2" style:family="paragraph" style:parent-style-name="Text_20_body" style:list-style-name="L2">
      <style:paragraph-properties fo:margin-top="0cm" fo:margin-bottom="0cm" style:contextual-spacing="false"/>
      <style:text-properties officeooo:rsid="003cb480" officeooo:paragraph-rsid="003cb480"/>
    </style:style>
    <style:style style:name="P3" style:family="paragraph" style:parent-style-name="Text_20_body" style:list-style-name="L2">
      <style:paragraph-properties fo:margin-top="0cm" fo:margin-bottom="0cm" style:contextual-spacing="false"/>
      <style:text-properties officeooo:rsid="003cb480" officeooo:paragraph-rsid="0040062d"/>
    </style:style>
    <style:style style:name="P4" style:family="paragraph" style:parent-style-name="Heading_20_1">
      <style:text-properties officeooo:rsid="002f4caf" officeooo:paragraph-rsid="002f4caf"/>
    </style:style>
    <style:style style:name="P5" style:family="paragraph" style:parent-style-name="Heading_20_3">
      <style:text-properties officeooo:paragraph-rsid="0040062d"/>
    </style:style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Heading_20_2" style:list-style-name="">
      <style:paragraph-properties fo:line-height="120%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Text_20_body">
      <style:text-properties officeooo:rsid="0025642b" officeooo:paragraph-rsid="0037c8e3"/>
    </style:style>
    <style:style style:name="P10" style:family="paragraph" style:parent-style-name="Text_20_body" style:list-style-name="L4">
      <style:paragraph-properties fo:margin-top="0cm" fo:margin-bottom="0cm" style:contextual-spacing="false"/>
      <style:text-properties officeooo:rsid="00406085" officeooo:paragraph-rsid="00406085"/>
    </style:style>
    <style:style style:name="P11" style:family="paragraph" style:parent-style-name="Heading_20_3">
      <style:text-properties officeooo:paragraph-rsid="0040110b"/>
    </style:style>
    <style:style style:name="P12" style:family="paragraph" style:parent-style-name="Heading_20_3">
      <style:text-properties officeooo:paragraph-rsid="003f1d1a"/>
    </style:style>
    <style:style style:name="P13" style:family="paragraph" style:parent-style-name="Heading_20_3">
      <style:text-properties officeooo:rsid="0023e27b" officeooo:paragraph-rsid="0037c8e3"/>
    </style:style>
    <style:style style:name="P14" style:family="paragraph" style:parent-style-name="Heading_20_2">
      <style:text-properties officeooo:rsid="0030b465" officeooo:paragraph-rsid="0030b465"/>
    </style:style>
    <style:style style:name="P15" style:family="paragraph" style:parent-style-name="Heading_20_3">
      <style:text-properties officeooo:rsid="0023e27b" officeooo:paragraph-rsid="0023e27b"/>
    </style:style>
    <style:style style:name="P16" style:family="paragraph" style:parent-style-name="Heading_20_1">
      <style:text-properties officeooo:rsid="0040110b" officeooo:paragraph-rsid="0040110b"/>
    </style:style>
    <style:style style:name="P17" style:family="paragraph" style:parent-style-name="First_20_paragraph" style:list-style-name="L5">
      <style:paragraph-properties fo:margin-top="0cm" fo:margin-bottom="0cm" style:contextual-spacing="false"/>
      <style:text-properties officeooo:rsid="003ccc5c" officeooo:paragraph-rsid="0040110b"/>
    </style:style>
    <style:style style:name="T1" style:family="text">
      <style:text-properties officeooo:rsid="002f4caf"/>
    </style:style>
    <style:style style:name="T2" style:family="text">
      <style:text-properties officeooo:rsid="003cb480"/>
    </style:style>
    <style:style style:name="T3" style:family="text">
      <style:text-properties officeooo:rsid="001bc3b4"/>
    </style:style>
    <style:style style:name="T4" style:family="text">
      <style:text-properties officeooo:rsid="0039747c"/>
    </style:style>
    <style:style style:name="T5" style:family="text">
      <style:text-properties officeooo:rsid="0037c8e3"/>
    </style:style>
    <style:style style:name="T6" style:family="text">
      <style:text-properties officeooo:rsid="00315c91"/>
    </style:style>
    <style:style style:name="T7" style:family="text">
      <style:text-properties officeooo:rsid="0030b465"/>
    </style:style>
    <style:style style:name="T8" style:family="text">
      <style:text-properties officeooo:rsid="0040110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635cm" text:min-label-width="0.635cm"/>
      </text:list-level-style-bullet>
      <text:list-level-style-bullet text:level="2" text:style-name="Bullet_20_Symbols" loext:num-list-format="%2%." style:num-suffix="." text:bullet-char="‣">
        <style:list-level-properties text:space-before="1.27cm" text:min-label-width="0.635cm"/>
      </text:list-level-style-bullet>
      <text:list-level-style-bullet text:level="3" text:style-name="Bullet_20_Symbols" loext:num-list-format="%3%." style:num-suffix="." text:bullet-char="⁃">
        <style:list-level-properties text:space-before="1.905cm" text:min-label-width="0.635cm"/>
      </text:list-level-style-bullet>
      <text:list-level-style-bullet text:level="4" text:style-name="Bullet_20_Symbols" loext:num-list-format="%4%." style:num-suffix="." text:bullet-char="•">
        <style:list-level-properties text:space-before="2.54cm" text:min-label-width="0.635cm"/>
      </text:list-level-style-bullet>
      <text:list-level-style-bullet text:level="5" text:style-name="Bullet_20_Symbols" loext:num-list-format="%5%." style:num-suffix="." text:bullet-char="‣">
        <style:list-level-properties text:space-before="3.175cm" text:min-label-width="0.635cm"/>
      </text:list-level-style-bullet>
      <text:list-level-style-bullet text:level="6" text:style-name="Bullet_20_Symbols" loext:num-list-format="%6%." style:num-suffix="." text:bullet-char="⁃">
        <style:list-level-properties text:space-before="3.81cm" text:min-label-width="0.635cm"/>
      </text:list-level-style-bullet>
      <text:list-level-style-bullet text:level="7" text:style-name="Bullet_20_Symbols" loext:num-list-format="%7%." style:num-suffix="." text:bullet-char="•">
        <style:list-level-properties text:space-before="4.445cm" text:min-label-width="0.635cm"/>
      </text:list-level-style-bullet>
      <text:list-level-style-bullet text:level="8" text:style-name="Bullet_20_Symbols" loext:num-list-format="%8%." style:num-suffix="." text:bullet-char="‣">
        <style:list-level-properties text:space-before="5.08cm" text:min-label-width="0.635cm"/>
      </text:list-level-style-bullet>
      <text:list-level-style-bullet text:level="9" text:style-name="Bullet_20_Symbols" loext:num-list-format="%9%." style:num-suffix="." text:bullet-char="⁃">
        <style:list-level-properties text:space-before="5.715cm" text:min-label-width="0.635cm"/>
      </text:list-level-style-bullet>
      <text:list-level-style-bullet text:level="10" text:style-name="Bullet_20_Symbols" loext:num-list-format="%10%.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ntact</text:h>
      <text:list text:style-name="L1">
        <text:list-item>
          <text:p text:style-name="P1"><text:a xlink:type="simple" xlink:href="mailto:mikeraynham@gmail.com" text:style-name="Internet_20_link" text:visited-style-name="Visited_20_Internet_20_Link"><text:span text:style-name="T1">mikeraynham@gmail.com</text:span></text:a><text:span text:style-name="T1"> | </text:span>+44 7813 307561</text:p>
        </text:list-item>
      </text:list>
      <text:h text:style-name="Heading_20_1" text:outline-level="1">Summary</text:h>
      <text:list text:style-name="L2">
        <text:list-item>
          <text:p text:style-name="P2">Hands-on Tech Lead and senior software engineer with over 30 years of experience across backend development, cloud platforms, and large-scale legacy systems.</text:p>
        </text:list-item>
        <text:list-item>
          <text:p text:style-name="P3">Specialising in modernising long-lived systems, migrating embedded legacy logic into high-performance architectures.</text:p>
        </text:list-item>
        <text:list-item>
          <text:p text:style-name="P3">Exploring Specification Driven Development (SDD) workflows that use agentic orchestration (LLM agents) to translate business requirements into documented, tested code.</text:p>
        </text:list-item>
        <text:list-item>
          <text:p text:style-name="P3">Experienced with GCP, Terraform, and PostgreSQL, with a track record of decoupling monolithic systems into modular services.</text:p>
        </text:list-item>
        <text:list-item>
          <text:p text:style-name="P3">Remote, UK. <text:s/>Open to fully remote roles with flexible working hours, where technical versatility and a disciplined approach to engineering are valued.</text:p>
        </text:list-item>
      </text:list>
      <text:h text:style-name="P4" text:outline-level="1">Employment</text:h>
      <text:h text:style-name="Heading_20_2" text:outline-level="2">Situation Publishing</text:h>
      <text:h text:style-name="Heading_20_3" text:outline-level="3">December 2022 to present (Tech Lead)</text:h>
      <text:h text:style-name="P5" text:outline-level="3">May 2017 to present (Senior Developer)</text:h>
      <text:p text:style-name="Text_20_body">Lead engineer for the backend systems powering The Register and the company's lead-generation platform, covering cloud architecture, legacy modernisation, and infrastructure automation.</text:p>
      <text:list text:style-name="L3">
        <text:list-item>
          <text:p text:style-name="P6">Cut call centre contact searches to near-instant by rewriting the lead-generation matching logic for a PostgreSQL-backed CRM, using denormalised, heavily indexed tables (B-tree, GIN trigram, tsvector), Redis per-campaign queues, and Kafka event logs.</text:p>
        </text:list-item>
        <text:list-item>
          <text:p text:style-name="P6">Progressively decoupling legacy Perl logic by building modern API endpoints, automation utilities, and event-driven pipelines, using Kafka and Debezium for replication and CDC.</text:p>
        </text:list-item>
        <text:list-item>
          <text:p text:style-name="P6">Developed production services in Rust to replace components of monolithic systems, including a database replication monitor, a short-URL redirector, and a Kafka consumer for lead-generation events. <text:s/>All deployed with Terraform.</text:p>
        </text:list-item>
        <text:list-item>
          <text:p text:style-name="P6">Designing and deploying GCP services (Cloud Run, Cloud Build, IAM, VPC access, IAP, HTTPS load balancers, Private Service Connect) via modular Terraform with secure defaults and automated deployments.</text:p>
        </text:list-item>
        <text:list-item>
          <text:p text:style-name="P6">Designing and optimising PostgreSQL/MySQL schemas and queries, and diagnosing system-wide production issues from databases to cloud services.</text:p>
        </text:list-item>
        <text:list-item>
          <text:p text:style-name="P6">Currently exploring agentic coding by designing a workflow where specialised LLM agents produce IEEE 830 specifications, refine them into EARS syntax and Gherkin scenarios, then validate generated code against the resulting BDD/TDD suite and bespoke LLM-oriented coding standards. <text:s/>The workflow is still in active development; applying it to production coding is the next step.</text:p>
        </text:list-item>
      </text:list>
      <text:h text:style-name="P7" text:outline-level="2"/>
      <text:h text:style-name="P8" text:outline-level="2">SpareRoom.co.uk</text:h>
      <text:h text:style-name="Heading_20_3" text:outline-level="3">August 2011 to <text:span text:style-name="T2">May 2017</text:span> <text:span text:style-name="T3">(Technical Lead)</text:span></text:h>
      <text:p text:style-name="P9">Technical Lead for one of the UK's busiest flat-sharing websites, driving improvements to code quality, performance, scalability, and development processes.</text:p>
      <text:p text:style-name="P9">Key achievements:</text:p>
      <text:list text:style-name="L4">
        <text:list-item>
          <text:p text:style-name="P10">Introduced Perl coding standards, code reviews, unit testing, and structured refactoring practices.</text:p>
        </text:list-item>
        <text:list-item>
          <text:p text:style-name="P10">Migrated version control from Subversion to Git.</text:p>
        </text:list-item>
        <text:list-item>
          <text:p text:style-name="P10">Improved scalability with memcached and Gearman; upgraded legacy Perl and MySQL systems.</text:p>
        </text:list-item>
        <text:list-item>
          <text:p text:style-name="P10">Built standardised development/testing environments using VirtualBox.</text:p>
        </text:list-item>
        <text:list-item>
          <text:p text:style-name="P10">Moved advert photo storage to AWS S3 behind EC2/ELB.</text:p>
        </text:list-item>
        <text:list-item>
          <text:p text:style-name="P10">Implemented HAProxy for front-end and database load balancing.</text:p>
        </text:list-item>
        <text:list-item>
          <text:p text:style-name="P10">Automated deployments using Perl, Rex, and Pinto.</text:p>
        </text:list-item>
        <text:list-item>
          <text:p text:style-name="P10">Led the migration of core search from MySQL to Sphinx Search, delivering major performance gains.</text:p>
        </text:list-item>
      </text:list>
      <text:h text:style-name="Heading_20_2" text:outline-level="2">Self <text:span text:style-name="T4">E</text:span>mployment</text:h>
      <text:h text:style-name="P11" text:outline-level="3">August 2005 to August 2011</text:h>
      <text:p text:style-name="Text_20_body">Freelance web development and IT support for small businesses, including building database-driven sites (Linux, Apache/nginx, MySQL, PHP, Perl), creating custom CMS platforms, and delivering bespoke data-processing utilities.</text:p>
      <text:h text:style-name="Heading_20_2" text:outline-level="2">Cheshire Building Society</text:h>
      <text:h text:style-name="Heading_20_3" text:outline-level="3">July 2001 to April 2003 (Technical Support Programmer)</text:h>
      <text:h text:style-name="P11" text:outline-level="3">April 2003 to August 2005 (Infrastructure &amp; Security Analyst)</text:h>
      <text:p text:style-name="Text_20_body">Third-level support for critical systems, followed by infrastructure and security work covering disaster recovery testing and firewall maintenance.</text:p>
      <text:h text:style-name="Heading_20_2" text:outline-level="2">Building Design Partnership</text:h>
      <text:h text:style-name="P12" text:outline-level="3">July 1996 to July 2001<text:span text:style-name="T5"> (Third-Level Technical Support)</text:span></text:h>
      <text:h text:style-name="Heading_20_2" text:outline-level="2">Expert Systems Design</text:h>
      <text:h text:style-name="P13" text:outline-level="3">July 1995 <text:span text:style-name="T6">to</text:span> J<text:span text:style-name="T7">uly</text:span> 1996<text:span text:style-name="T5"> (Developer &amp; On-Site Support)</text:span></text:h>
      <text:h text:style-name="P14" text:outline-level="2">Atkins Odlin &amp; Partners</text:h>
      <text:h text:style-name="P15" text:outline-level="3">April 1992 to July 1995 (Computer Administrator &amp; AutoCAD Technician)</text:h>
      <text:h text:style-name="P16" text:outline-level="1">Technical Skills</text:h>
      <text:list text:style-name="L5">
        <text:list-item>
          <text:p text:style-name="P17">Languages: Perl (primary), JavaScript, SQL (PostgreSQL &amp; MySQL), Rust (novice), Bash</text:p>
        </text:list-item>
        <text:list-item>
          <text:p text:style-name="P17">Cloud: Google Cloud Platform (Cloud Run, Cloud Build, IAM, IAP, VPC, PSC, AlloyDB)</text:p>
        </text:list-item>
        <text:list-item>
          <text:p text:style-name="P17">Infrastructure: Terraform, CI/CD pipelines, automated deployments</text:p>
        </text:list-item>
        <text:list-item>
          <text:p text:style-name="P17">Data &amp; Streaming: PostgreSQL, MySQL, Apache Kafka, Debezium</text:p>
        </text:list-item>
        <text:list-item>
          <text:p text:style-name="P17"><text:span text:style-name="T8">S</text:span>ystems &amp; Ops: Linux, Git, systemd</text:p>
        </text:list-item>
        <text:list-item>
          <text:p text:style-name="P17">Web: HTML/CSS/JavaScript, Apache HTTP Server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ourier New" svg:font-family="'Courier New'" style:font-family-generic="modern" style:font-pitch="fixed"/>
    <style:font-face style:name="Droid Sans" svg:font-family="'Droid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erriweather" svg:font-family="Merriweather" style:font-adornments="Regular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cm" style:contextual-spacing="false" fo:line-height="120%"/>
      <style:text-properties fo:color="#4c4c4c" loext:opacity="100%" style:font-name="Merriweather" fo:font-family="Merriweather" style:font-style-name="Regular" style:font-pitch="variable" fo:font-size="8pt" fo:language="en" fo:country="GB"/>
    </style:style>
    <style:style style:name="Heading" style:family="paragraph" style:parent-style-name="Standard" style:next-style-name="Text_20_body" style:class="chapter" style:master-page-name="">
      <style:paragraph-properties fo:margin-top="0.199cm" fo:margin-bottom="0cm" style:contextual-spacing="false" style:page-number="auto" style:shadow="none" fo:keep-with-next="always"/>
      <style:text-properties fo:text-transform="uppercase" style:use-window-font-color="true" loext:opacity="0%" style:font-name="Droid Sans" fo:font-family="'Droid Sans'" style:font-style-name="Regular" style:font-family-generic="swiss" style:font-pitch="variable" fo:font-size="10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variant="normal" fo:text-transform="none" fo:font-size="199%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variant="normal" fo:text-transform="none" fo:font-size="141%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variant="normal" fo:text-transform="none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Header" style:family="paragraph" style:parent-style-name="Standard" style:class="extra">
      <style:paragraph-properties fo:text-align="center" style:justify-single-word="false" fo:padding="0.499cm" fo:border-left="none" fo:border-right="none" fo:border-top="none" fo:border-bottom="0.06pt solid #999999" style:shadow="none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text-transform="uppercase" style:use-window-font-color="true" loext:opacity="0%" style:font-name="Droid Sans" fo:font-family="'Droid Sans'" style:font-style-name="Regular" style:font-family-generic="swiss" style:font-pitch="variable" fo:font-size="141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a290f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transparent" style:dynamic-spacing="false" draw:fill="none" draw:fill-color="#99ccff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>
      <style:header>
        <text:p text:style-name="MP1">Mike Raynham</text:p>
      </style:header>
      <style:footer>
        <text:p text:style-name="MP2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ike Raynham Curriculum Vitae</dc:title>
    <dc:date>2026-05-16T12:53:50.318860000</dc:date>
    <meta:editing-duration>PT3H32M10S</meta:editing-duration>
    <meta:editing-cycles>39</meta:editing-cycles>
    <meta:generator>LibreOffice/25.8.3.2$MacOSX_AARCH64 LibreOffice_project/8ca8d55c161d602844f5428fa4b58097424e324e</meta:generator>
    <meta:document-statistic meta:table-count="0" meta:image-count="0" meta:object-count="0" meta:page-count="2" meta:paragraph-count="53" meta:word-count="617" meta:character-count="4442" meta:non-whitespace-character-count="3900"/>
  </office:meta>
</office:document-meta>
</file>